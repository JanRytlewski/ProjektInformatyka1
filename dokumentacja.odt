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bbe" officeooo:paragraph-rsid="00007b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29/05. rozpoczecie projektu.</text:p>
      <text:p text:style-name="P1">2. 12/06. wprowadzenie mechanizmu akcij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6-06-12T12:37:08.592000000</dc:date>
    <meta:editing-duration>PT2M5S</meta:editing-duration>
    <meta:editing-cycles>1</meta:editing-cycles>
    <meta:document-statistic meta:table-count="0" meta:image-count="0" meta:object-count="0" meta:page-count="1" meta:paragraph-count="2" meta:word-count="9" meta:character-count="71" meta:non-whitespace-character-count="64"/>
  </office:meta>
</office:document-meta>
</file>